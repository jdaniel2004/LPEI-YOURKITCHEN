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2D0000002D054F4051C.png" manifest:media-type="image/png"/>
  <manifest:file-entry manifest:full-path="Pictures/1000000100000F000000027DFE79EE4B.png" manifest:media-type="image/png"/>
  <manifest:file-entry manifest:full-path="Pictures/100000000000000800000008CF8EA02F.png" manifest:media-type="image/png"/>
  <manifest:file-entry manifest:full-path="Pictures/100000010000020000000200484E0615.png" manifest:media-type="image/png"/>
  <manifest:file-entry manifest:full-path="Pictures/10000001000004B0000000FA97C15F61.png" manifest:media-type="image/png"/>
  <manifest:file-entry manifest:full-path="Pictures/10000001000003840000038446A991E2.png" manifest:media-type="image/png"/>
  <manifest:file-entry manifest:full-path="Pictures/100000010000019000000190F35FF86C.png" manifest:media-type="image/png"/>
  <manifest:file-entry manifest:full-path="Pictures/10000001000000C0000000C02210EAC0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" style:font-pitch="variable"/>
    <style:font-face style:name="Inter1" svg:font-family="Inter" style:font-adornments="Bold"/>
    <style:font-face style:name="Inter2" svg:font-family="Inter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emiCondensed" svg:font-family="'Noto Sans SemiCondensed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text-align="right" style:justify-single-word="false"/>
      <style:text-properties fo:language="pt" fo:country="PT" style:language-asian="zxx" style:country-asian="none" style:language-complex="zxx" style:country-complex="none" style:script-type="latin"/>
    </style:style>
    <style:style style:name="P2" style:family="paragraph" style:parent-style-name="Subtitle">
      <style:text-properties style:font-name="Liberation Sans" fo:font-size="28pt" fo:language="pt" fo:country="PT" style:font-size-asian="28pt" style:language-asian="zxx" style:country-asian="none" style:font-size-complex="28pt" style:language-complex="zxx" style:country-complex="none" style:script-type="latin"/>
    </style:style>
    <style:style style:name="P3" style:family="paragraph" style:parent-style-name="Title">
      <style:paragraph-properties fo:text-align="left" style:justify-single-word="false"/>
      <style:text-properties fo:color="#2a6099" loext:opacity="100%" fo:language="pt" fo:country="PT" style:text-underline-style="none" officeooo:paragraph-rsid="000e68c4" style:language-asian="zxx" style:country-asian="none" style:language-complex="zxx" style:country-complex="none" style:script-type="latin"/>
    </style:style>
    <style:style style:name="P4" style:family="paragraph" style:parent-style-name="Subtitle">
      <style:text-properties fo:language="pt" fo:country="PT" style:language-asian="zxx" style:country-asian="none" style:language-complex="zxx" style:country-complex="none" style:script-type="latin"/>
    </style:style>
    <style:style style:name="P5" style:family="paragraph" style:parent-style-name="Subtitle">
      <style:paragraph-properties fo:text-align="left" style:justify-single-word="false"/>
      <style:text-properties fo:language="pt" fo:country="PT" officeooo:rsid="001164b9" officeooo:paragraph-rsid="00134d66" style:language-asian="zxx" style:country-asian="none" style:language-complex="zxx" style:country-complex="none" style:script-type="latin"/>
    </style:style>
    <style:style style:name="P6" style:family="paragraph" style:parent-style-name="Text_20_body">
      <style:paragraph-properties fo:text-align="right" style:justify-single-word="false"/>
      <style:text-properties fo:language="pt" fo:country="PT" style:text-underline-style="solid" style:text-underline-width="auto" style:text-underline-color="font-color" style:language-asian="zxx" style:country-asian="none" style:language-complex="zxx" style:country-complex="none" style:script-type="latin"/>
    </style:style>
    <style:style style:name="P7" style:family="paragraph" style:parent-style-name="Text_20_body">
      <style:paragraph-properties fo:text-align="right" style:justify-single-word="false"/>
      <style:text-properties fo:color="#ffffff" loext:opacity="100%" fo:language="pt" fo:country="PT" fo:font-weight="bold" officeooo:rsid="001ddf15" officeooo:paragraph-rsid="001ddf15" style:language-asian="zxx" style:country-asian="none" style:font-weight-asian="bold" style:language-complex="zxx" style:country-complex="none" style:font-weight-complex="bold" style:script-type="latin"/>
    </style:style>
    <style:style style:name="P8" style:family="paragraph" style:parent-style-name="Text_20_body">
      <style:paragraph-properties fo:text-align="right" style:justify-single-word="false"/>
      <style:text-properties fo:color="#ffffff" loext:opacity="100%" fo:language="pt" fo:country="PT" fo:font-weight="bold" officeooo:paragraph-rsid="003468fa" style:language-asian="zxx" style:country-asian="none" style:font-weight-asian="bold" style:language-complex="zxx" style:country-complex="none" style:font-weight-complex="bold" style:script-type="latin"/>
    </style:style>
    <style:style style:name="P9" style:family="paragraph" style:parent-style-name="Text_20_body">
      <style:paragraph-properties fo:text-align="right" style:justify-single-word="false"/>
      <style:text-properties fo:color="#ffffff" loext:opacity="100%" fo:language="pt" fo:country="PT" fo:font-weight="bold" officeooo:paragraph-rsid="00174053" style:language-asian="zxx" style:country-asian="none" style:font-weight-asian="bold" style:language-complex="zxx" style:country-complex="none" style:font-weight-complex="bold" style:script-type="latin"/>
    </style:style>
    <style:style style:name="P10" style:family="paragraph" style:parent-style-name="Text_20_body">
      <style:paragraph-properties fo:text-align="right" style:justify-single-word="false"/>
      <style:text-properties fo:color="#ffffff" loext:opacity="100%" fo:language="pt" fo:country="PT" fo:font-weight="bold" officeooo:rsid="00359087" officeooo:paragraph-rsid="00359087" style:language-asian="zxx" style:country-asian="none" style:font-weight-asian="bold" style:language-complex="zxx" style:country-complex="none" style:font-weight-complex="bold" style:script-type="latin"/>
    </style:style>
    <style:style style:name="P11" style:family="paragraph" style:parent-style-name="Subtitle">
      <style:paragraph-properties fo:text-align="center" style:justify-single-word="false" fo:break-before="page"/>
      <style:text-properties style:text-position="super 58%" fo:language="pt" fo:country="PT" officeooo:paragraph-rsid="00559076" style:language-asian="zxx" style:country-asian="none" style:language-complex="zxx" style:country-complex="none" style:script-type="latin"/>
    </style:style>
    <style:style style:name="P12" style:family="paragraph" style:parent-style-name="Text_20_body">
      <style:paragraph-properties fo:text-align="center" style:justify-single-word="false"/>
      <style:text-properties style:text-position="super 58%" fo:language="pt" fo:country="PT" style:language-asian="zxx" style:country-asian="none" style:language-complex="zxx" style:country-complex="none" style:script-type="latin"/>
    </style:style>
    <style:style style:name="P13" style:family="paragraph" style:parent-style-name="Subtitle">
      <style:paragraph-properties fo:margin-left="0in" fo:margin-top="0.0417in" fo:margin-bottom="0.0835in" style:contextual-spacing="false" fo:line-height="150%" fo:text-align="center" style:justify-single-word="false" fo:text-indent="0in" style:auto-text-indent="false"/>
      <style:text-properties fo:language="pt" fo:country="PT" style:language-asian="zxx" style:country-asian="none" style:language-complex="zxx" style:country-complex="none" style:script-type="latin"/>
    </style:style>
    <style:style style:name="P14" style:family="paragraph" style:parent-style-name="Subtitle">
      <style:paragraph-properties fo:text-align="center" style:justify-single-word="false" fo:break-before="page"/>
      <style:text-properties fo:language="pt" fo:country="PT" style:language-asian="zxx" style:country-asian="none" style:language-complex="zxx" style:country-complex="none" style:script-type="latin"/>
    </style:style>
    <style:style style:name="P15" style:family="paragraph" style:parent-style-name="Text_20_body">
      <style:text-properties fo:language="pt" fo:country="PT" officeooo:rsid="00210932" officeooo:paragraph-rsid="00210932" style:language-asian="zxx" style:country-asian="none" style:language-complex="zxx" style:country-complex="none" style:script-type="latin"/>
    </style:style>
    <style:style style:name="P16" style:family="paragraph" style:parent-style-name="Text_20_body">
      <style:paragraph-properties>
        <style:tab-stops>
          <style:tab-stop style:position="7.1492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7.0728in" style:type="right"/>
        </style:tab-stops>
      </style:paragraph-properties>
    </style:style>
    <style:style style:name="P18" style:family="paragraph" style:parent-style-name="Heading_20_1">
      <style:paragraph-properties fo:margin-left="0in" fo:text-indent="0in" style:auto-text-indent="false" fo:break-before="page"/>
      <style:text-properties fo:language="pt" fo:country="PT" officeooo:rsid="00310135" officeooo:paragraph-rsid="00310135" style:language-asian="zxx" style:country-asian="none" style:language-complex="zxx" style:country-complex="none" style:script-type="latin"/>
    </style:style>
    <style:style style:name="P19" style:family="paragraph" style:parent-style-name="Text_20_body">
      <style:text-properties fo:language="pt" fo:country="PT" style:language-asian="zxx" style:country-asian="none" style:language-complex="zxx" style:country-complex="none" style:script-type="latin"/>
    </style:style>
    <style:style style:name="P20" style:family="paragraph" style:parent-style-name="Heading_20_1">
      <style:paragraph-properties fo:break-before="page"/>
      <style:text-properties fo:language="pt" fo:country="PT" officeooo:rsid="005d1a6b" officeooo:paragraph-rsid="005d1a6b" style:language-asian="zxx" style:country-asian="none" style:language-complex="zxx" style:country-complex="none" style:script-type="latin"/>
    </style:style>
    <style:style style:name="P21" style:family="paragraph" style:parent-style-name="Heading_20_2">
      <style:text-properties fo:language="pt" fo:country="PT" style:language-asian="zxx" style:country-asian="none" style:language-complex="zxx" style:country-complex="none" style:script-type="latin"/>
    </style:style>
    <style:style style:name="P22" style:family="paragraph" style:parent-style-name="Text_20_body">
      <style:text-properties fo:language="pt" fo:country="PT" officeooo:rsid="006a5226" officeooo:paragraph-rsid="0095bb95" style:language-asian="zxx" style:country-asian="none" style:language-complex="zxx" style:country-complex="none" style:script-type="latin"/>
    </style:style>
    <style:style style:name="P23" style:family="paragraph" style:parent-style-name="Solution">
      <style:text-properties fo:language="pt" fo:country="PT" style:language-asian="zxx" style:country-asian="none" style:language-complex="zxx" style:country-complex="none" style:script-type="latin"/>
    </style:style>
    <style:style style:name="P24" style:family="paragraph" style:parent-style-name="Text_20_body">
      <style:text-properties fo:language="pt" fo:country="PT" officeooo:paragraph-rsid="006bc8b9" style:language-asian="zxx" style:country-asian="none" style:language-complex="zxx" style:country-complex="none" style:script-type="latin"/>
    </style:style>
    <style:style style:name="P25" style:family="paragraph" style:parent-style-name="Text_20_body">
      <style:paragraph-properties fo:margin-left="0in" fo:text-indent="0in" style:auto-text-indent="false"/>
      <style:text-properties fo:language="pt" fo:country="PT" officeooo:rsid="006c3b4c" officeooo:paragraph-rsid="006c3b4c" style:language-asian="zxx" style:country-asian="none" style:language-complex="zxx" style:country-complex="none" style:script-type="latin"/>
    </style:style>
    <style:style style:name="P26" style:family="paragraph" style:parent-style-name="Text_20_body">
      <style:text-properties fo:language="pt" fo:country="PT" officeooo:rsid="006c3b4c" officeooo:paragraph-rsid="006c3b4c" style:language-asian="zxx" style:country-asian="none" style:language-complex="zxx" style:country-complex="none" style:script-type="latin"/>
    </style:style>
    <style:style style:name="P27" style:family="paragraph" style:parent-style-name="Heading_20_2" style:list-style-name="">
      <style:text-properties fo:language="pt" fo:country="PT" officeooo:rsid="006e2a35" officeooo:paragraph-rsid="006e2a35" style:language-asian="zxx" style:country-asian="none" style:language-complex="zxx" style:country-complex="none" style:script-type="latin"/>
    </style:style>
    <style:style style:name="P28" style:family="paragraph" style:parent-style-name="Solution">
      <style:paragraph-properties fo:break-before="page"/>
      <style:text-properties fo:language="pt" fo:country="PT" style:language-asian="zxx" style:country-asian="none" style:language-complex="zxx" style:country-complex="none" style:script-type="latin"/>
    </style:style>
    <style:style style:name="P29" style:family="paragraph" style:parent-style-name="Text_20_body">
      <style:text-properties fo:language="pt" fo:country="PT" officeooo:paragraph-rsid="006e2a35" style:language-asian="zxx" style:country-asian="none" style:language-complex="zxx" style:country-complex="none" style:script-type="latin"/>
    </style:style>
    <style:style style:name="P30" style:family="paragraph" style:parent-style-name="Text_20_body">
      <style:paragraph-properties fo:margin-left="0in" fo:text-indent="0in" style:auto-text-indent="false"/>
      <style:text-properties fo:language="pt" fo:country="PT" officeooo:paragraph-rsid="006e2a35" style:language-asian="zxx" style:country-asian="none" style:language-complex="zxx" style:country-complex="none" style:script-type="latin"/>
    </style:style>
    <style:style style:name="P31" style:family="paragraph" style:parent-style-name="Standard">
      <style:paragraph-properties fo:margin-left="0in" fo:text-indent="0in" style:auto-text-indent="false"/>
      <style:text-properties fo:language="pt" fo:country="PT" officeooo:paragraph-rsid="006e2a35" style:language-asian="zxx" style:country-asian="none" style:language-complex="zxx" style:country-complex="none" style:script-type="latin"/>
    </style:style>
    <style:style style:name="P32" style:family="paragraph" style:parent-style-name="Text_20_body">
      <style:paragraph-properties fo:margin-left="0in" fo:text-indent="0in" style:auto-text-indent="false"/>
      <style:text-properties fo:language="pt" fo:country="PT" officeooo:paragraph-rsid="0085f5a3" style:language-asian="zxx" style:country-asian="none" style:language-complex="zxx" style:country-complex="none" style:script-type="latin"/>
    </style:style>
    <style:style style:name="P33" style:family="paragraph" style:parent-style-name="Text_20_body">
      <style:paragraph-properties fo:margin-left="0in" fo:text-indent="0in" style:auto-text-indent="false"/>
      <style:text-properties fo:language="pt" fo:country="PT" style:language-asian="zxx" style:country-asian="none" style:language-complex="zxx" style:country-complex="none" style:script-type="latin"/>
    </style:style>
    <style:style style:name="P34" style:family="paragraph" style:parent-style-name="Text_20_body">
      <style:text-properties fo:language="pt" fo:country="PT" officeooo:paragraph-rsid="008869c3" style:language-asian="zxx" style:country-asian="none" style:language-complex="zxx" style:country-complex="none" style:script-type="latin"/>
    </style:style>
    <style:style style:name="P35" style:family="paragraph" style:parent-style-name="Heading_20_2">
      <style:paragraph-properties fo:break-before="page"/>
      <style:text-properties fo:language="pt" fo:country="PT" officeooo:rsid="009ac692" officeooo:paragraph-rsid="009ac692" style:language-asian="zxx" style:country-asian="none" style:language-complex="zxx" style:country-complex="none" style:script-type="latin"/>
    </style:style>
    <style:style style:name="P36" style:family="paragraph" style:parent-style-name="Text_20_body">
      <style:text-properties fo:language="pt" fo:country="PT" officeooo:rsid="009ac692" officeooo:paragraph-rsid="009ac692" style:language-asian="zxx" style:country-asian="none" style:language-complex="zxx" style:country-complex="none" style:script-type="latin"/>
    </style:style>
    <style:style style:name="P37" style:family="paragraph" style:parent-style-name="Solution">
      <style:text-properties fo:language="pt" fo:country="PT" officeooo:rsid="00af9d6a" officeooo:paragraph-rsid="00af9d6a" style:language-asian="zxx" style:country-asian="none" style:language-complex="zxx" style:country-complex="none" style:script-type="latin"/>
    </style:style>
    <style:style style:name="P38" style:family="paragraph" style:parent-style-name="Text_20_body">
      <style:paragraph-properties fo:margin-left="0in" fo:text-indent="0in" style:auto-text-indent="false"/>
      <style:text-properties fo:language="pt" fo:country="PT" officeooo:paragraph-rsid="00b14fa9" style:language-asian="zxx" style:country-asian="none" style:language-complex="zxx" style:country-complex="none" style:script-type="latin"/>
    </style:style>
    <style:style style:name="P39" style:family="paragraph" style:parent-style-name="Solution">
      <style:paragraph-properties fo:break-before="page"/>
      <style:text-properties fo:language="pt" fo:country="PT" style:script-type="latin"/>
    </style:style>
    <style:style style:name="P40" style:family="paragraph" style:parent-style-name="Text_20_body">
      <style:text-properties fo:language="pt" fo:country="PT" style:script-type="latin"/>
    </style:style>
    <style:style style:name="P41" style:family="paragraph" style:parent-style-name="Heading_20_2">
      <style:paragraph-properties fo:break-before="page"/>
      <style:text-properties fo:language="pt" fo:country="PT" style:script-type="latin"/>
    </style:style>
    <style:style style:name="P42" style:family="paragraph" style:parent-style-name="Heading_20_1">
      <style:paragraph-properties fo:break-before="page"/>
      <style:text-properties fo:language="pt" fo:country="PT" officeooo:rsid="009cbe8a" officeooo:paragraph-rsid="009cbe8a" style:language-asian="zxx" style:country-asian="none" style:language-complex="zxx" style:country-complex="none" style:script-type="latin"/>
    </style:style>
    <style:style style:name="P43" style:family="paragraph" style:parent-style-name="Text_20_body">
      <style:text-properties fo:language="pt" fo:country="PT" officeooo:rsid="003d595d" officeooo:paragraph-rsid="003d595d" style:language-asian="zxx" style:country-asian="none" style:language-complex="zxx" style:country-complex="none" style:script-type="latin"/>
    </style:style>
    <style:style style:name="P44" style:family="paragraph" style:parent-style-name="Text_20_body">
      <style:paragraph-properties fo:margin-left="0in" fo:text-indent="0in" style:auto-text-indent="false"/>
      <style:text-properties officeooo:paragraph-rsid="003d595d"/>
    </style:style>
    <style:style style:name="P45" style:family="paragraph" style:parent-style-name="Text_20_body">
      <style:text-properties fo:language="pt" fo:country="PT" officeooo:rsid="0061146b" officeooo:paragraph-rsid="003d595d" style:language-asian="zxx" style:country-asian="none" style:language-complex="zxx" style:country-complex="none" style:script-type="latin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T2" style:family="text">
      <style:text-properties fo:font-size="28pt" style:font-size-asian="24.5pt" style:font-size-complex="28pt"/>
    </style:style>
    <style:style style:name="T3" style:family="text">
      <style:text-properties officeooo:rsid="002e0395"/>
    </style:style>
    <style:style style:name="T4" style:family="text">
      <style:text-properties officeooo:rsid="000d0c40"/>
    </style:style>
    <style:style style:name="T5" style:family="text">
      <style:text-properties fo:font-size="72pt" officeooo:rsid="00559076" style:font-size-asian="72pt" style:font-size-complex="72pt"/>
    </style:style>
    <style:style style:name="T6" style:family="text">
      <style:text-properties fo:font-size="18pt" officeooo:rsid="004c2b08" style:font-size-asian="18pt" style:font-size-complex="18pt"/>
    </style:style>
    <style:style style:name="T7" style:family="text">
      <style:text-properties officeooo:rsid="00269f0e"/>
    </style:style>
    <style:style style:name="T8" style:family="text">
      <style:text-properties officeooo:rsid="004360ab"/>
    </style:style>
    <style:style style:name="T9" style:family="text">
      <style:text-properties officeooo:rsid="0096fcae"/>
    </style:style>
    <style:style style:name="T10" style:family="text">
      <style:text-properties officeooo:rsid="0072cdec"/>
    </style:style>
    <style:style style:name="T11" style:family="text">
      <style:text-properties fo:font-family="Inter"/>
    </style:style>
    <style:style style:name="T12" style:family="text">
      <style:text-properties officeooo:rsid="00c0fdad"/>
    </style:style>
    <style:style style:name="T13" style:family="text">
      <style:text-properties fo:language="pt" fo:country="PT" style:language-asian="zxx" style:country-asian="none" style:language-complex="zxx" style:country-complex="none" style:script-type="latin"/>
    </style:style>
    <style:style style:name="T14" style:family="text">
      <style:text-properties fo:language="pt" fo:country="PT" fo:font-weight="bold" officeooo:rsid="0061146b" style:language-asian="zxx" style:country-asian="none" style:font-weight-asian="bold" style:language-complex="zxx" style:country-complex="none" style:font-weight-complex="bold" style:script-type="latin"/>
    </style:style>
    <style:style style:name="T15" style:family="text">
      <style:text-properties fo:language="pt" fo:country="PT" officeooo:rsid="0061146b" style:language-asian="zxx" style:country-asian="none" style:language-complex="zxx" style:country-complex="none" style:script-type="latin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a54fc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textarea-horizontal-align="justify" draw:textarea-vertical-align="middle" draw:auto-grow-height="false" fo:min-height="2.4492in" fo:min-width="3.589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 Copy 1" text:anchor-type="char" svg:x="3.1957in" svg:y="0.1in" svg:width="3.7016in" svg:height="0.6138in" draw:z-index="6"><draw:image xlink:href="Pictures/1000000100000F000000027DFE79EE4B.png" xlink:type="simple" xlink:show="embed" xlink:actuate="onLoad" draw:mime-type="image/png"/></draw:frame></text:p>
      <text:p text:style-name="P2"/>
      <text:p text:style-name="P2"/>
      <text:p text:style-name="P2"/>
      <text:p text:style-name="P2"><text:bookmark-start text:name="__RefHeading___Toc73_1010677199"/>2025/26<text:bookmark-end text:name="__RefHeading___Toc73_1010677199"/></text:p>
      <text:p text:style-name="P3"><draw:custom-shape text:anchor-type="paragraph" draw:z-index="2" draw:name="Shape 1" draw:style-name="gr1" svg:width="7.1776in" svg:height="7.3476in" svg:x="0.6417in" svg:y="1.4035in"><text:p/>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range-x-minimum="0" draw:handle-range-x-maximum="21600" draw:handle-position="$0 top" draw:handle-position-x="$0" draw:handle-position-y="top"/></draw:enhanced-geometry></draw:custom-shape><text:span text:style-name="T1">YOUR</text:span>KITCHEN</text:p>
      <text:p text:style-name="P4">Projeto de <text:span text:style-name="T2">Engenharia</text:span> </text:p>
      <text:p text:style-name="P5">Informática</text:p>
      <text:p text:style-name="P6"/>
      <text:p text:style-name="P6"/>
      <text:p text:style-name="P6"/>
      <text:p text:style-name="P6"/>
      <text:p text:style-name="P6"/>
      <text:p text:style-name="P7">Alun<text:span text:style-name="T3">o:</text:span></text:p>
      <text:p text:style-name="P8">Jorge Dan<text:span text:style-name="T4">iel Sampaio Melo Teixeira</text:span></text:p>
      <text:p text:style-name="P8"><text:span text:style-name="T3">a</text:span><text:span text:style-name="T4">l81547</text:span></text:p>
      <text:p text:style-name="P9"/>
      <text:p text:style-name="P7">Docente:</text:p>
      <text:p text:style-name="P10">Frederico Augusto dos Santos Branco</text:p>
      <text:p text:style-name="P11"><text:span text:style-name="T5">RESUMO</text:span></text:p>
      <text:p text:style-name="P12"/>
      <text:p text:style-name="P13"><text:span text:style-name="T6">O YourKitchen é uma solução multiplataforma de gestão para restauração, integrando um Point of Sale (POS), um Kitchen Display System (KDS) e um Backoffice, com comunicação em tempo real via WebSockets. O sistema foi desenvolvido com recurso a Vibe Coding, permitindo a gestão completa de mesas, pedidos, pagamentos, stocks e relatórios num único ecossistema digital.</text:span></text:p>
      <text:p text:style-name="P14">Tabela de <text:span text:style-name="T7">C</text:span>onteúdos</text:p>
      <text:p text:style-name="P15"/>
      <text:table-of-content text:style-name="Sect1" text:protected="true" text:name="Table of Contents1">
        <text:table-of-content-source text:outline-level="10" text:use-index-marks="false" text:relative-tab-stop-position="false">
          <text:index-title-template text:style-name="Contents_20_Heading"/>
          <text:table-of-content-entry-template text:outline-level="1" text:style-name="Text_20_body">
            <text:index-entry-text text:style-name="Strong_20_Emphasis"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text text:style-name="Bullet_20_Symbols"/>
            <text:index-entry-tab-stop style:type="right" style:leader-char=" "/>
            <text:index-entry-page-number/>
            <text:index-entry-tab-stop style:type="right" style:leader-char=" "/>
            <text:index-entry-span>  </text:index-entry-span>
          </text:table-of-content-entry-template>
          <text:table-of-content-entry-template text:outline-level="3" text:style-name="Contents_20_3">
            <text:index-entry-text/>
            <text:index-entry-chapter/>
            <text:index-entry-tab-stop text:style-name="Bullet_20_Symbols" style:type="left" style:position="0in" style:leader-char="."/>
            <text:index-entry-tab-stop style:type="left" style:position="0in" style:leader-char=" 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text/>
            <text:index-entry-chapter/>
            <text:index-entry-tab-stop text:style-name="Bullet_20_Symbols" style:type="left" style:position="0in" style:leader-char="."/>
            <text:index-entry-tab-stop style:type="left" style:position="0in" style:leader-char=" 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text/>
            <text:index-entry-chapter/>
            <text:index-entry-tab-stop text:style-name="Bullet_20_Symbols" style:type="left" style:position="0in" style:leader-char="."/>
            <text:index-entry-tab-stop style:type="left" style:position="0in" style:leader-char=" 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text/>
            <text:index-entry-chapter/>
            <text:index-entry-tab-stop text:style-name="Bullet_20_Symbols" style:type="left" style:position="0in" style:leader-char="."/>
            <text:index-entry-tab-stop style:type="left" style:position="0in" style:leader-char=" 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text/>
            <text:index-entry-chapter/>
            <text:index-entry-tab-stop text:style-name="Bullet_20_Symbols" style:type="left" style:position="0in" style:leader-char="."/>
            <text:index-entry-tab-stop style:type="left" style:position="0in" style:leader-char=" 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text/>
            <text:index-entry-chapter/>
            <text:index-entry-tab-stop text:style-name="Bullet_20_Symbols" style:type="left" style:position="0in" style:leader-char="."/>
            <text:index-entry-tab-stop style:type="left" style:position="0in" style:leader-char=" 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text/>
            <text:index-entry-chapter/>
            <text:index-entry-tab-stop text:style-name="Bullet_20_Symbols" style:type="left" style:position="0in" style:leader-char="."/>
            <text:index-entry-tab-stop style:type="left" style:position="0in" style:leader-char=" 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text/>
            <text:index-entry-chapter/>
            <text:index-entry-tab-stop text:style-name="Bullet_20_Symbols" style:type="left" style:position="0in" style:leader-char="."/>
            <text:index-entry-tab-stop style:type="left" style:position="0in" style:leader-char=" "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<text:span text:style-name="Strong_20_Emphasis">Introdução</text:span><text:tab/>4</text:p>
          <text:p text:style-name="P16"><text:span text:style-name="Strong_20_Emphasis">Estado da Arte</text:span><text:tab/>5</text:p>
          <text:p text:style-name="P17"><text:span text:style-name="Bullet_20_Symbols">Soluções Existentes no Mercado</text:span><text:tab/>5<text:tab/> <text:s/></text:p>
          <text:p text:style-name="P17"><text:span text:style-name="Bullet_20_Symbols">Lacunas Identificadas</text:span><text:tab/>7<text:tab/> <text:s/></text:p>
          <text:p text:style-name="P17"><text:span text:style-name="Bullet_20_Symbols">Seleção Tecnológica</text:span><text:tab/>8<text:tab/> <text:s/></text:p>
          <text:p text:style-name="P17"><text:span text:style-name="Bullet_20_Symbols">Vibe Coding e Desenvolvimento Assistido por Inteligência Artificial</text:span><text:tab/>10<text:tab/> <text:s/></text:p>
          <text:p text:style-name="P16"><text:span text:style-name="Strong_20_Emphasis">Anexos</text:span><text:tab/>11</text:p>
          <text:p text:style-name="P17"><text:span text:style-name="Bullet_20_Symbols">Anexo A – Stack de Hosting e Repositório de Código</text:span><text:tab/>11<text:tab/> <text:s/></text:p>
          <text:p text:style-name="P17"><text:span text:style-name="Bullet_20_Symbols">Anexo B – Tecnologias de Desenvolvimento</text:span><text:tab/>11<text:tab/> <text:s/></text:p>
          <text:p text:style-name="P17"><text:span text:style-name="Bullet_20_Symbols">Anexo C – Ferramentas de Inteligência Artificial</text:span><text:tab/>11<text:tab/> <text:s/></text:p>
          <text:p text:style-name="P17"><text:span text:style-name="Bullet_20_Symbols">Anexo D – Ferramentas de Modelação e Diagramas</text:span><text:tab/>11<text:tab/> <text:s/></text:p>
        </text:index-body>
      </text:table-of-content>
      <text:h text:style-name="P18" text:outline-level="1" text:is-list-header="true"><text:bookmark-start text:name="__RefHeading___Toc91_4097566859"/>Introdução<text:bookmark-end text:name="__RefHeading___Toc91_4097566859"/></text:h>
      <text:p text:style-name="P19"/>
      <text:p text:style-name="P19"><text:tab/>O setor da restauração caracteriza-se por um ambiente operacional exigente, onde a rapidez de serviço e a comunicação eficiente entre a sala e a cozinha são determinantes para a qualidade do atendimento. A ausência de ferramentas digitais integradas traduz-se frequentemente em erros de pedidos, atrasos na preparação e dificuldades na gestão de stocks e faturação.</text:p>
      <text:p text:style-name="P19"><text:tab/>Neste contexto, o projeto YourKitchen propõe o desenvolvimento de uma solução multiplataforma de gestão para restauração, composta por três módulos integrados: um Point of Sale (POS) para registo de pedidos e processamento de pagamentos, um Kitchen Display System (KDS) para visualização e acompanhamento dos pedidos na cozinha em tempo real, e um Backoffice para gestão de menus, stocks, utilizadores e relatórios. A comunicação entre o POS e o KDS é assegurada por WebSockets, garantindo sincronização instantânea entre dispositivos.</text:p>
      <text:p text:style-name="P19"><text:tab/>O desenvolvimento seguiu uma abordagem de Vibe Coding, utilizando ferramentas de Inteligência Artificial generativa para apoiar a geração de código a partir dos diagramas UML e especificações funcionais produzidos na fase de análise.</text:p>
      <text:p text:style-name="P19"><text:tab/>O presente relatório documenta todo o processo de conceção e desenvolvimento d<text:span text:style-name="T8">esta</text:span> solução.</text:p>
      <text:h text:style-name="P20" text:outline-level="1"><text:bookmark-start text:name="__RefHeading___Toc329_1058922876"/>Estado da Arte<text:bookmark-end text:name="__RefHeading___Toc329_1058922876"/></text:h>
      <text:h text:style-name="P21" text:outline-level="2"><text:bookmark-start text:name="__RefHeading___Toc1062_1058922876"/>S<text:span text:style-name="T9">oluções Existentes no Mercado</text:span><text:bookmark-end text:name="__RefHeading___Toc1062_1058922876"/></text:h>
      <text:p text:style-name="P22"><text:tab/>O mercado de software para restauração é relativamente maduro, existindo diversas soluções comerciais com diferentes graus de integração entre o ponto de venda, a cozinha e o backoffice. As soluções mais relevantes para o contexto deste projeto são analisadas de seguida.</text:p>
      <text:p text:style-name="P23"><text:bookmark-start text:name="__RefHeading___Toc331_1058922876"/>Square for Re<draw:frame draw:style-name="fr1" draw:name="Image2" text:anchor-type="char" svg:x="2.9909in" svg:y="-0.1409in" svg:width="0.7437in" svg:height="0.7437in" draw:z-index="7"><draw:image xlink:href="Pictures/100000010000020000000200484E0615.png" xlink:type="simple" xlink:show="embed" xlink:actuate="onLoad" draw:mime-type="image/png"/></draw:frame>staurants<text:bookmark-end text:name="__RefHeading___Toc331_1058922876"/></text:p>
      <text:p text:style-name="P24"/>
      <text:p text:style-name="P25"><text:tab/>O Square for Restaurants é uma das plataformas POS mais adotadas a nível global. A sua arquitetura assenta numa stack tecnológica proprietária com aplicações nativas iOS e Android, processamento de pagamentos integrado via hardware dedicado (Square Terminal e Square Reader), e sincronização de dados através de APIs REST com respostas em tempo quase-real. O módulo KDS é opcional e comunicado via polling periódico ao servidor Square, o que pode introduzir latências de até vários segundos em contextos de elevada carga. O backoffice oferece dashboards analíticos detalhados, relatórios de vendas por produto, período e empregado, e gestão remota de menus. A solidez da sua infraestrutura cloud, alojada na Google Cloud Platform, confere-lhe elevada disponibilidade e escalabilidade. A principal limitação reside no modelo de negócio: além das taxas de subscrição mensais, o Square cobra uma comissão por transação processada, o que impacta diretamente as margens do estabelecimento.</text:p>
      <text:p text:style-name="P26"/>
      <text:h text:style-name="P27" text:outline-level="2"/>
      <text:p text:style-name="P28"><text:bookmark-start text:name="__RefHeading___Toc333_1058922876"/>Toast POS<draw:frame draw:style-name="fr2" draw:name="Image3" text:anchor-type="char" svg:x="0.6173in" svg:y="-0.1661in" svg:width="3.1618in" svg:height="0.6591in" draw:z-index="1"><draw:image xlink:href="Pictures/10000001000004B0000000FA97C15F61.png" xlink:type="simple" xlink:show="embed" xlink:actuate="onLoad" draw:mime-type="image/png"/></draw:frame><text:bookmark-end text:name="__RefHeading___Toc333_1058922876"/></text:p>
      <text:p text:style-name="P29"/>
      <text:p text:style-name="P30"><text:tab/>O Toast é considerado por analistas como a Datassential e a Technomic como a plataforma POS número um no mercado norte-americano de restauração, com mais de 120 000 restaurantes a utilizá-la em 2024. A sua diferenciação técnica reside no facto de ser construído exclusivamente sobre Android, com hardware robusto e resistente ao ambiente de cozinha (splash-proof terminals), e de oferecer comunicação KDS verdadeiramente em tempo real através de uma rede local dedicada, independente da conectividade à internet. Esta arquitetura híbrida — cloud para backoffice, rede local para operação — garante resiliência operacional mesmo em caso de falha de internet. O Toast integra ainda funcionalidades avançadas como gestão de reservas, programa de fidelização, e integração com plataformas de delivery (DoorDash, Uber Eats). O modelo de preços, com planos que incluem hardware obrigatório em regime de leasing, representa um investimento inicial elevado.</text:p>
      <text:p text:style-name="P31"><draw:frame draw:style-name="fr2" draw:name="Image4" text:anchor-type="char" svg:x="2.5673in" svg:y="0.1811in" svg:width="1.1236in" svg:height="1.1236in" draw:z-index="0"><draw:image xlink:href="Pictures/100000010000019000000190F35FF86C.png" xlink:type="simple" xlink:show="embed" xlink:actuate="onLoad" draw:mime-type="image/png"/></draw:frame></text:p>
      <text:p text:style-name="P29"/>
      <text:p text:style-name="P23"><text:bookmark-start text:name="__RefHeading___Toc335_1058922876"/>Li<text:span text:style-name="T10">ghtspeed Restaurant</text:span><text:bookmark-end text:name="__RefHeading___Toc335_1058922876"/></text:p>
      <text:p text:style-name="P19"/>
      <text:p text:style-name="P32"><text:tab/>O Lightspeed posiciona-se como a solução de referência para restaurantes de gama alta e grupos multi-localização. A sua arquitetura é totalmente cloud-native, construída sobre React no frontend e uma API GraphQL no backend, alojada na AWS. Esta abordagem confere-lhe uma capacidade de customização e integração com sistemas externos (ERP, contabilidade, plataformas de reservas como OpenTable) superior à da concorrência. O módulo de gestão de stock é particularmente robusto, oferecendo controlo de custos de mercadoria (food cost) em tempo real, fichas técnicas com abate automático de ingredientes e alertas de rutura. Em termos de analytics, o Lightspeed disponibiliza relatórios preditivos com recurso a machine learning para previsão de procura e otimização de ementas. É a plataforma tecnicamente mais avançada do mercado, mas também a mais complexa de implementar e a mais dispendiosa em termos de licenciamento anual.</text:p>
      <text:h text:style-name="P21" text:outline-level="2"/>
      <text:p text:style-name="P28"><draw:frame draw:style-name="fr2" draw:name="Image5" text:anchor-type="char" svg:x="1.202in" svg:y="-0.3311in" svg:width="0.9909in" svg:height="0.9909in" draw:z-index="3"><draw:image xlink:href="Pictures/10000001000000C0000000C02210EAC0.png" xlink:type="simple" xlink:show="embed" xlink:actuate="onLoad" draw:mime-type="image/png"/></draw:frame>Revo XEF</text:p>
      <text:p text:style-name="P33"/>
      <text:p text:style-name="P33"><text:tab/>O Revo XEF é a solução dominante no mercado ibérico, com forte presença em Portugal e Espanha. Construído sobre uma arquitetura iOS-first com aplicações nativas para iPad, o Revo XEF destaca-se pela fluidez da interface tátil e pela integração nativa com o ecossistema Apple (AirPrint para impressão de recibos, Apple Pay). A comunicação entre POS e KDS é realizada via WebSocket sobre rede local, garantindo sincronização em tempo real sem dependência de internet. O backoffice é acedido via browser e oferece configuração remota de menus, gestão de utilizadores com controlo de acessos por role, e relatórios de vendas com exportação para Excel. A limitação mais significativa do Revo XEF é a sua dependência exclusiva do hardware Apple, que implica um custo de entrada mais elevado comparativamente a soluções Android ou web-based.</text:p>
      <text:h text:style-name="P21" text:outline-level="2"><text:bookmark-start text:name="__RefHeading___Toc866_1058922876"/><text:span text:style-name="T11">Lacunas</text:span> <text:span text:style-name="T11">Identificadas</text:span><text:bookmark-end text:name="__RefHeading___Toc866_1058922876"/></text:h>
      <text:p text:style-name="P34"><text:tab/>A análise das soluções existentes revela um padrão comum: todas assentam em stacks proprietárias e hardware dedicado, criando ecossistemas fechados que limitam a flexibilidade e a portabilidade da solução. A comunicação em tempo real entre POS e KDS, quando existe, é na maioria dos casos restrita à rede local, perdendo funcionalidade em cenários cloud ou multi-dispositivo. Adicionalmente, nenhuma das soluções analisadas é construída sobre tecnologias web abertas que permitam a um programador individual desenvolver, customizar e publicar uma solução funcional sem dependência de contratos comerciais ou hardware específico.</text:p>
      <text:p text:style-name="P34"><text:tab/>O YourKitchen responde a estas lacunas posicionando-se como uma solução web-first, agnóstica em termos de hardware, com comunicação em tempo real verdadeira via WebSocket em ambiente cloud, e construída sobre tecnologias abertas e amplamente adotadas pela comunidade de desenvolvimento.</text:p>
      <text:h text:style-name="P35" text:outline-level="2"><text:bookmark-start text:name="__RefHeading___Toc1064_1058922876"/>Seleção Tecnológica<text:bookmark-end text:name="__RefHeading___Toc1064_1058922876"/></text:h>
      <text:p text:style-name="P36"><text:tab/>A escolha das tecnologias que suportam o YourKitchen foi orientada pela sua adequação técnica aos requisitos do sis<draw:frame draw:style-name="fr2" draw:name="Image6" text:anchor-type="char" svg:x="3.9972in" svg:y="0.9937in" svg:width="0.8335in" svg:height="0.8335in" draw:z-index="4"><draw:image xlink:href="Pictures/10000001000002D0000002D054F4051C.png" xlink:type="simple" xlink:show="embed" xlink:actuate="onLoad" draw:mime-type="image/png"/></draw:frame>tema, pela maturidade do ecossistema, pelo suporte da comunidade de desenvolvimento e pela compatibilidade com a abordagem de Vibe Coding adoptada. </text:p>
      <text:p text:style-name="P37">Next.js – Framework Full Stack</text:p>
      <text:p text:style-name="P38"><text:tab/></text:p>
      <text:p text:style-name="P38"><text:tab/>O Next.js, desenvolvido e mantido pela Vercel, é actualmente o framework React mais utilizado para desenvolvimento web full-stack, com mais de 6 milhões de transferências semanais no npm e utilização confirmada por empresas como a Netflix, o TikTok e o GitHub. A sua principal vantagem reside na unificação do frontend e do backend num único projecto: as API Routes do Next.js permitem definir endpoints REST e WebSocket sem necessidade de um servidor separado, simplificando consideravelmente a arquitectura do sistema.</text:p>
      <text:p text:style-name="P33"><text:tab/>No que respeita ao rendering, o Next.js oferece suporte nativo a Server-Side Rendering (SSR), Static Site Generation (SSG) e Incremental Static Regeneration (ISR), permitindo optimizar a estratégia de renderização por rota. Para uma aplicação POS, o SSR garante que a interface é servida com dados actualizados em cada pedido, sem depender exclusivamente de JavaScript no cliente. O App Router, introduzido na versão 13, simplifica a organização do código e é particularmente adequado para a estrutura multi-módulo do YourKitchen — o POS, o KDS e o Backoffice podem ser organizados como segmentos de rota independentes, com layouts e middlewares próprios. A integração nativa com React Server Components reduz ainda o bundle enviado ao cliente, melhorando a performance da interface táctil em dispositivos de menor capacidade.</text:p>
      <text:p text:style-name="P39"><draw:frame draw:style-name="fr2" draw:name="Image7" text:anchor-type="char" svg:x="4.3516in" svg:y="-0.222in" svg:width="0.8118in" svg:height="0.8118in" draw:z-index="5"><draw:image xlink:href="Pictures/10000001000003840000038446A991E2.png" xlink:type="simple" xlink:show="embed" xlink:actuate="onLoad" draw:mime-type="image/png"/></draw:frame>Supabase — Backend-as-a-Service</text:p>
      <text:p text:style-name="P40"/>
      <text:p text:style-name="P40"><text:tab/>O Supabase é uma plataforma Backend-as-a-Service (BaaS) de código aberto, frequentemente descrita como a alternativa open-source ao Firebase, com a diferença fundamental de assentar sobre PostgreSQL em vez de uma base de dados NoSQL. Esta escolha é determinante para o YourKitchen: a natureza relacional dos dados do sistema — com entidades fortemente relacionadas como mesas, pedidos, itens de menu, ingredientes, receitas e pagamentos — beneficia das garantias de integridade referencial, das transacções ACID e das capacidades de consulta avançadas que o PostgreSQL oferece.</text:p>
      <text:p text:style-name="P40"><text:tab/>Para além da base de dados, o Supabase disponibiliza um conjunto de serviços integrados que cobrem os principais requisitos de infraestrutura do sistema. O módulo de autenticação suporta múltiplos métodos de acesso e controlo por função (RLS — Row Level Security), alinhando-se directamente com o modelo de perfis do YourKitchen: Gestor, Empregado de Mesa e Cozinheiro. O módulo Supabase Realtime implementa WebSockets sobre as tabelas do PostgreSQL através do protocolo Phoenix Channels, de modo a que qualquer alteração a um registo — como a mudança de estado de um pedido — seja transmitida em tempo real a todos os clientes subscritos. Esta funcionalidade é central para a sincronização entre o POS e o KDS, dispensando a implementação de uma camada WebSocket personalizada. O Supabase Storage complementa a oferta, disponibilizando armazenamento de ficheiros para as imagens dos itens de menu.</text:p>
      <text:p text:style-name="P40"/>
      <text:h text:style-name="P41" text:outline-level="2"><text:bookmark-start text:name="__RefHeading___Toc1718_1058922876"/>Vibe Coding e Desenvolvimento Assistido por Inteligência Artificia<text:span text:style-name="T12">l</text:span><text:bookmark-end text:name="__RefHeading___Toc1718_1058922876"/></text:h>
      <text:p text:style-name="P40"><text:tab/>O Vibe Coding é um paradigma de desenvolvimento de software introduzido por Andrej Karpathy em Fevereiro de 2025, que defende a utilização de modelos de linguagem de grande dimensão (LLMs) como parceiros activos no processo de programação. Em vez de escrever código linha a linha, o programador descreve a intenção funcional em linguagem natural — frequentemente complementada com diagramas UML ou especificações estruturadas — e a ferramenta de inteligência artificial gera o código correspondente. Ao programador cabe o papel de arquitecto e revisor: valida, corrige e integra o código gerado no contexto do sistema.</text:p>
      <text:p text:style-name="P40"><text:tab/>Este paradigma representa uma alteração significativa no ciclo de desenvolvimento: a fase de análise e modelação torna-se mais crítica, dado que a qualidade do código gerado depende directamente da precisão e completude das especificações fornecidas como contexto. No âmbito deste projecto, os diagramas de casos de uso, de classes, entidade-relacionamento, de actividade e de estado — produzidos na fase de engenharia de requisitos — foram utilizados como system prompts para orientar a geração de código pelas ferramentas Google Antigravity e Stich, cobrindo desde os modelos de dados e os endpoints da API até aos componentes de interface.</text:p>
      <text:p text:style-name="P40"><text:tab/>Importa sublinhar que o Vibe Coding não elimina a necessidade de competência técnica. Pelo contrário, exige que o programador domine suficientemente a arquitectura do sistema para avaliar a correcção do código gerado, identificar problemas de design e integrar os diferentes componentes de forma coerente. A vantagem principal reside na aceleração das fases de boilerplate e scaffolding, libertando o programador para se concentrar nas decisões de maior complexidade e valor.</text:p>
      <text:h text:style-name="P42" text:outline-level="1"><text:bookmark-start text:name="__RefHeading___Toc337_1058922876"/>Anexos<text:bookmark-end text:name="__RefHeading___Toc337_1058922876"/></text:h>
      <text:p text:style-name="P43"/>
      <text:h text:style-name="Heading_20_2" text:outline-level="2"><text:a xlink:type="simple" xlink:href="https://www.drawio.com/" text:style-name="Internet_20_link" text:visited-style-name="Visited_20_Internet_20_Link"><text:bookmark-start text:name="__RefHeading___Toc1205_1058922876"/></text:a><text:span text:style-name="T13">Anexo A – Stack de Hosting e Repositório de Código</text:span><text:bookmark-end text:name="__RefHeading___Toc1205_1058922876"/></text:h>
      <text:p text:style-name="P44"><text:span text:style-name="T14"><text:s text:c="2"/>Vercel</text:span><text:span text:style-name="T15"> — </text:span><text:a xlink:type="simple" xlink:href="https://vercel.com/" text:style-name="Internet_20_link" text:visited-style-name="Visited_20_Internet_20_Link"><text:span text:style-name="T15">https://vercel.com</text:span></text:a><text:span text:style-name="T15"> </text:span></text:p>
      <text:p text:style-name="P45"><text:span text:style-name="T16">Supabase</text:span> — <text:a xlink:type="simple" xlink:href="https://supabase.com/" text:style-name="Internet_20_link" text:visited-style-name="Visited_20_Internet_20_Link">https://supabase.com</text:a> </text:p>
      <text:p text:style-name="P45"><text:span text:style-name="T16">GitHub</text:span> — <text:a xlink:type="simple" xlink:href="https://github.com/" text:style-name="Internet_20_link" text:visited-style-name="Visited_20_Internet_20_Link">https://github.com</text:a> </text:p>
      <text:p text:style-name="P45"><text:span text:style-name="T16">Aplicação em produção</text:span>: <text:a xlink:type="simple" xlink:href="https://lpei-yourkitchen.vercel.app/" text:style-name="Internet_20_link" text:visited-style-name="Visited_20_Internet_20_Link">https://lpei-yourkitchen.vercel.app/</text:a> </text:p>
      <text:p text:style-name="P45"><text:span text:style-name="T16">Repositório</text:span>: <text:a xlink:type="simple" xlink:href="https://github.com/jdaniel2004/LPEI-YOURKITCHEN" text:style-name="Internet_20_link" text:visited-style-name="Visited_20_Internet_20_Link">https://github.com/jdaniel2004/LPEI-YOURKITCHEN</text:a> </text:p>
      <text:h text:style-name="P21" text:outline-level="2" text:is-list-header="true"><text:bookmark-start text:name="__RefHeading___Toc1207_1058922876"/><text:span text:style-name="T17">Anexo</text:span> B – Tecnologias de Desenvolvimento<text:bookmark-end text:name="__RefHeading___Toc1207_1058922876"/></text:h>
      <text:p text:style-name="P45"><text:span text:style-name="T16">Next.js</text:span> — <text:a xlink:type="simple" xlink:href="https://nextjs.org/" text:style-name="Internet_20_link" text:visited-style-name="Visited_20_Internet_20_Link">https://nextjs.org</text:a> </text:p>
      <text:p text:style-name="P45"><text:span text:style-name="T16">PostgreSQL</text:span> — <text:a xlink:type="simple" xlink:href="https://www.postgresql.org/" text:style-name="Internet_20_link" text:visited-style-name="Visited_20_Internet_20_Link">https://www.postgresql.org</text:a> </text:p>
      <text:h text:style-name="P21" text:outline-level="2" text:is-list-header="true"><text:bookmark-start text:name="__RefHeading___Toc1307_1058922876"/>Anexo C – Ferramentas de Inteligência Artificial<text:bookmark-end text:name="__RefHeading___Toc1307_1058922876"/></text:h>
      <text:p text:style-name="P45"><text:span text:style-name="T16">Claude (Anthropic)</text:span> — <text:a xlink:type="simple" xlink:href="https://claude.ai/" text:style-name="Internet_20_link" text:visited-style-name="Visited_20_Internet_20_Link">https://claude.ai</text:a> </text:p>
      <text:p text:style-name="P45"><text:span text:style-name="T16">Google Gemini</text:span> — <text:a xlink:type="simple" xlink:href="https://gemini.google.com/" text:style-name="Internet_20_link" text:visited-style-name="Visited_20_Internet_20_Link">https://gemini.google.com</text:a> </text:p>
      <text:h text:style-name="P21" text:outline-level="2" text:is-list-header="true"><text:bookmark-start text:name="__RefHeading___Toc1209_1058922876"/>Anexo D – Ferramentas de Modelação e Diagramas<text:bookmark-end text:name="__RefHeading___Toc1209_1058922876"/></text:h>
      <text:p text:style-name="P45"><text:span text:style-name="T16">Draw.io</text:span> — <text:a xlink:type="simple" xlink:href="https://www.drawio.com/" text:style-name="Internet_20_link" text:visited-style-name="Visited_20_Internet_20_Link">https://www.drawio.com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" style:font-pitch="variable"/>
    <style:font-face style:name="Inter1" svg:font-family="Inter" style:font-adornments="Bold"/>
    <style:font-face style:name="Inter2" svg:font-family="Inter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emiCondensed" svg:font-family="'Noto Sans SemiCondensed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hatch draw:name="Black_20_0_20_Degrees" draw:display-name="Black 0 Degrees" draw:style="single" draw:color="#000000" draw:distance="0.0402in" draw:rotation="0"/>
    <draw:fill-image draw:name="Bitmap_20_4" draw:display-name="Bitmap 4" xlink:href="Pictures/100000000000000800000008CF8EA02F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emiCondensed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SemiCondensed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emiCondensed" style:font-family-asian="'Noto Sans SemiCondensed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1201in" fo:margin-right="0.1201in" fo:margin-top="0in" fo:margin-bottom="0.0972in" style:contextual-spacing="false" fo:line-height="150%" fo:text-indent="0in" style:auto-text-indent="false" fo:background-color="transparent"/>
      <style:text-properties style:font-name="Inter" fo:font-family="Inter" style:font-pitch="variable" style:text-underline-style="none" officeooo:rsid="0039ca66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loext:graphic-properties draw:fill="none" draw:fill-color="#729fcf"/>
      <style:paragraph-properties fo:margin-left="0.1201in" fo:margin-right="0.1201in" fo:margin-top="0.1665in" fo:margin-bottom="0.0835in" style:contextual-spacing="false" fo:text-align="right" style:justify-single-word="false" fo:text-indent="0in" style:auto-text-indent="false" fo:background-color="transparent" fo:keep-with-next="always"/>
      <style:text-properties style:font-name="Inter" fo:font-family="Inter" style:font-pitch="variable" fo:font-size="40pt" style:text-underline-style="solid" style:text-underline-width="auto" style:text-underline-color="font-color" fo:font-weight="bold" officeooo:rsid="000e68c4" style:font-size-asian="40pt" style:font-weight-asian="bold" style:font-size-complex="4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846in" style:type="center"/>
          <style:tab-stop style:position="7.1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846in" style:type="center"/>
          <style:tab-stop style:position="7.1701in" style:type="right"/>
        </style:tab-stops>
      </style:paragraph-properties>
    </style:style>
    <style:style style:name="Subtitle" style:family="paragraph" style:parent-style-name="Heading" style:next-style-name="Text_20_body" style:class="chapter">
      <loext:graphic-properties draw:fill="none" draw:fill-color="#729fcf"/>
      <style:paragraph-properties fo:margin-left="0.1201in" fo:margin-right="0.1201in" fo:margin-top="0.0417in" fo:margin-bottom="0.0835in" style:contextual-spacing="false" fo:text-align="left" style:justify-single-word="false" fo:text-indent="0in" style:auto-text-indent="false" fo:background-color="transparent" fo:keep-with-next="always"/>
      <style:text-properties style:font-name="Inter" fo:font-family="Inter" style:font-pitch="variable" fo:font-size="32pt" style:text-underline-style="none" fo:font-weight="bold" style:font-size-asian="32pt" style:font-weight-asian="bold" style:font-size-complex="32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="solid" draw:fill-color="#dee6ef"/>
      <style:paragraph-properties fo:margin-left="0.1201in" fo:margin-right="0.1201in" fo:margin-top="0.1665in" fo:margin-bottom="0.0835in" style:contextual-spacing="false" fo:text-align="center" style:justify-single-word="false" fo:text-indent="0in" style:auto-text-indent="false" fo:background-color="#dee6ef" fo:keep-with-next="always"/>
      <style:text-properties fo:font-size="32pt" fo:font-weight="bold" style:font-size-asian="28pt" style:font-weight-asian="bold" style:font-size-complex="2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5846in" style:type="center"/>
          <style:tab-stop style:position="7.1701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.1701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139in" fo:margin-bottom="0.0835in" style:contextual-spacing="false" style:page-number="auto"/>
      <style:text-properties style:font-name="Inter1" fo:font-family="Inter" style:font-style-name="Bold" fo:font-size="20pt" fo:font-weight="bold" officeooo:rsid="008869c3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9736in" style:type="right" style:leader-style="dotted" style:leader-text="."/>
        </style:tab-stops>
      </style:paragraph-properties>
    </style:style>
    <style:style style:name="Solution" style:family="paragraph" style:parent-style-name="Standard" style:next-style-name="Text_20_body" style:master-page-name="">
      <loext:graphic-properties draw:fill="none" draw:fill-color="#dee6ef"/>
      <style:paragraph-properties style:page-number="auto" fo:background-color="transparent"/>
      <style:text-properties fo:color="#5983b0" loext:opacity="100%" style:text-outline="false" style:font-name="Inter2" fo:font-family="Inter" style:font-style-name="Regular" fo:font-size="16pt" fo:font-weight="bold" style:text-emphasize="none" style:text-overline-style="none" style:text-overline-color="font-color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color="#ffffff" loext:opacity="100%" fo:font-size="20pt" fo:font-weight="bold" officeooo:rsid="0027c929" officeooo:paragraph-rsid="0027c929" style:font-size-asian="20pt" style:font-weight-asian="bold" style:font-size-complex="20pt" style:font-weight-complex="bold"/>
    </style:style>
    <style:page-layout style:name="Mpm1">
      <style:page-layout-properties fo:page-width="8.2701in" fo:page-height="11.6902in" style:num-format="1" style:print-orientation="portrait" fo:margin-top="0.55in" fo:margin-bottom="0.55in" fo:margin-left="0.55in" fo:margin-right="0.55in" fo:border="2.24pt solid #2a6099" fo:padding="0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color="#729fcf" draw:gradient-step-count="0" draw:fill-hatch-solid="false" draw:fill-image-name="Bitmap_20_4" draw:fill-image-width="0in" draw:fill-image-height="0in" style:repeat="repeat" draw:fill-image-ref-point-x="0%" draw:fill-image-ref-point-y="0%" draw:fill-image-ref-point="center" draw:tile-repeat-offset="0% vertical" style:footnote-max-height="1in" loext:margin-gutter="0in">
        <style:background-image xlink:href="Pictures/100000000000000800000008CF8EA02F.png" xlink:type="simple" xlink:actuate="onLoad"/>
        <style:columns fo:column-count="1" fo:column-gap="0in"/>
        <style:footnote-sep style:width="0.0071in" style:distance-before-sep="0.0402in" style:distance-after-sep="0.0402in" style:line-style="solid" style:adjustment="center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5in" fo:margin-bottom="0.5in" fo:margin-left="0.5in" fo:margin-right="0.5in" fo:background-color="#729fc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729fc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2701in" fo:page-height="11.6902in" style:num-format="1" style:print-orientation="portrait" fo:margin-top="0.5in" fo:margin-bottom="0.2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3598in" fo:margin-left="6.8299in" fo:margin-right="0in" fo:margin-top="0in" fo:background-color="#729fcf" style:dynamic-spacing="false" draw:fill="solid" draw:fill-color="#729fcf" draw:opacity="100%"/>
      </style:footer-style>
    </style:page-layout>
    <style:page-layout style:name="Mpm11">
      <style:page-layout-properties fo:page-width="8.2681in" fo:page-height="11.6929in" style:num-format="1" style:print-orientation="portrait" fo:margin-top="1in" fo:margin-bottom="1in" fo:margin-left="1.25in" fo:margin-right="1.25in" fo:background-color="#395068" style:writing-mode="lr-tb" draw:fill="gradient" draw:fill-gradient-name="Gradient_20_1" draw:gradient-step-count="3" draw:fill-hatch-name="Black_20_0_20_Degrees" draw:fill-hatch-solid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729fcf" draw:gradient-step-count="0" draw:fill-hatch-solid="false" draw:fill-image-name="Bitmap_20_4" draw:fill-image-width="0in" draw:fill-image-height="0in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729fcf" draw:opacity="100%"/>
    </style:style>
    <style:style style:name="Mdp4" style:family="drawing-page">
      <style:drawing-page-properties draw:fill="gradient" draw:fill-gradient-name="Gradient_20_1" draw:gradient-step-count="3" draw:fill-hatch-name="Black_20_0_20_Degrees" draw:fill-hatch-solid="false"/>
    </style:style>
  </office:automatic-styles>
  <office:master-styles>
    <style:master-page style:name="Standard" style:page-layout-name="Mpm1" draw:style-name="Mdp1" style:next-style-name="Resumo"/>
    <style:master-page style:name="Endnote" style:page-layout-name="Mpm2" draw:style-name="Mdp2"/>
    <style:master-page style:name="First_20_Page" style:display-name="First Page" style:page-layout-name="Mpm3" draw:style-name="Mdp2" style:next-style-name="Standard"/>
    <style:master-page style:name="Left_20_Page" style:display-name="Left Page" style:page-layout-name="Mpm4" draw:style-name="Mdp2" style:next-style-name="Right_20_Page"/>
    <style:master-page style:name="Right_20_Page" style:display-name="Right Page" style:page-layout-name="Mpm5" draw:style-name="Mdp2" style:next-style-name="Left_20_Page"/>
    <style:master-page style:name="Envelope" style:page-layout-name="Mpm6" draw:style-name="Mdp2"/>
    <style:master-page style:name="Index" style:page-layout-name="Mpm7" draw:style-name="Mdp3" style:next-style-name="Página"/>
    <style:master-page style:name="HTML" loext:hidden="true" style:hidden="true" style:page-layout-name="Mpm8" draw:style-name="Mdp2"/>
    <style:master-page style:name="Footnote" style:page-layout-name="Mpm2" draw:style-name="Mdp2"/>
    <style:master-page style:name="Landscape" style:page-layout-name="Mpm9" draw:style-name="Mdp2"/>
    <style:master-page style:name="Página" style:page-layout-name="Mpm10" draw:style-name="Mdp2">
      <style:footer>
        <text:p text:style-name="MP1"><text:bookmark-start text:name="PageNumWizard_FOOTER_Página3"/><text:page-number text:select-page="current" text:page-adjust="-3">8</text:page-number><text:bookmark-end text:name="PageNumWizard_FOOTER_Página3"/></text:p>
      </style:footer>
    </style:master-page>
    <style:master-page style:name="Resumo" style:page-layout-name="Mpm11" draw:style-name="Mdp4" style:next-style-name="Index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8T14:00:17.445607951</meta:creation-date>
    <dc:date>2026-06-09T21:01:47.156870900</dc:date>
    <meta:editing-duration>PT5H16M12S</meta:editing-duration>
    <meta:editing-cycles>178</meta:editing-cycles>
    <meta:generator>LibreOffice/26.2.1.2$Windows_X86_64 LibreOffice_project/620$Build-2</meta:generator>
    <meta:print-date>2026-06-09T21:01:05.637183000</meta:print-date>
    <meta:printed-by>PDF files</meta:printed-by>
    <meta:document-statistic meta:table-count="0" meta:image-count="7" meta:object-count="0" meta:page-count="11" meta:paragraph-count="71" meta:word-count="1835" meta:character-count="12743" meta:non-whitespace-character-count="10890"/>
  </office:meta>
</office:document-meta>
</file>