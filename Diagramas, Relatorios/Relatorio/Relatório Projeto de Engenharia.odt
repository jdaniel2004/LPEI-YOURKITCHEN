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CF8EA0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P1" style:family="paragraph" style:parent-style-name="Title">
      <style:paragraph-properties fo:text-align="end" style:justify-single-word="false"/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Heading_20_1">
      <style:paragraph-properties fo:text-align="end" style:justify-single-word="false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ubtitle">
      <style:text-properties style:font-name="Liberation Sans" fo:font-size="28pt" style:font-size-asian="28pt" style:font-size-complex="28pt"/>
    </style:style>
    <style:style style:name="P4" style:family="paragraph" style:parent-style-name="Title">
      <style:paragraph-properties fo:text-align="start" style:justify-single-word="false"/>
      <style:text-properties fo:color="#2a6099" loext:opacity="100%" fo:language="zxx" fo:country="none" style:text-underline-style="none" officeooo:paragraph-rsid="000e68c4" style:language-asian="zxx" style:country-asian="none" style:language-complex="zxx" style:country-complex="none"/>
    </style:style>
    <style:style style:name="P5" style:family="paragraph" style:parent-style-name="Subtitle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Subtitle">
      <style:paragraph-properties fo:text-align="start" style:justify-single-word="false"/>
      <style:text-properties fo:language="zxx" fo:country="none" officeooo:rsid="001164b9" officeooo:paragraph-rsid="00134d66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end" style:justify-single-word="false"/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end" style:justify-single-word="false"/>
      <style:text-properties fo:color="#ffffff" loext:opacity="100%" fo:language="zxx" fo:country="none" fo:font-weight="bold" officeooo:rsid="001ddf15" officeooo:paragraph-rsid="001ddf15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ext_20_body">
      <style:paragraph-properties fo:text-align="end" style:justify-single-word="false"/>
      <style:text-properties fo:color="#ffffff" loext:opacity="100%" fo:language="zxx" fo:country="none" fo:font-weight="bold" officeooo:paragraph-rsid="00174053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ubtitle">
      <style:paragraph-properties fo:text-align="center" style:justify-single-word="false" fo:break-before="page"/>
    </style:style>
    <style:style style:name="P11" style:family="paragraph" style:parent-style-name="Text_20_body">
      <style:text-properties officeooo:rsid="00210932" officeooo:paragraph-rsid="00210932"/>
    </style:style>
    <style:style style:name="P12" style:family="paragraph" style:parent-style-name="Heading_20_1">
      <style:paragraph-properties fo:break-before="page"/>
      <style:text-properties officeooo:rsid="00310135" officeooo:paragraph-rsid="00310135"/>
    </style:style>
    <style:style style:name="P13" style:family="paragraph" style:parent-style-name="Text_20_body">
      <style:text-properties officeooo:rsid="00310135" officeooo:paragraph-rsid="00310135"/>
    </style:style>
    <style:style style:name="P14" style:family="paragraph" style:parent-style-name="Text_20_body">
      <style:paragraph-properties fo:break-before="page"/>
      <style:text-properties officeooo:rsid="00210932" officeooo:paragraph-rsid="00210932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fo:font-size="28pt" style:font-size-asian="24.5pt" style:font-size-complex="28pt"/>
    </style:style>
    <style:style style:name="T3" style:family="text">
      <style:text-properties officeooo:rsid="002e0395"/>
    </style:style>
    <style:style style:name="T4" style:family="text">
      <style:text-properties officeooo:rsid="000d0c40"/>
    </style:style>
    <style:style style:name="T5" style:family="text">
      <style:text-properties officeooo:rsid="00269f0e"/>
    </style:style>
    <style:style style:name="T6" style:family="text">
      <style:text-properties officeooo:rsid="0031ef15"/>
    </style:style>
    <style:style style:name="T7" style:family="text">
      <style:text-properties fo:font-style="italic" officeooo:rsid="0031ef15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horizontal-align="justify" draw:textarea-vertical-align="middle" draw:auto-grow-height="false" fo:min-height="2.4492in" fo:min-width="3.589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/>
      <text:h text:style-name="P2" text:outline-level="1"/>
      <text:p text:style-name="P3"><text:bookmark-start text:name="__RefHeading___Toc73_1010677199"/>2025/26<text:bookmark-end text:name="__RefHeading___Toc73_1010677199"/></text:p>
      <text:p text:style-name="P4"><draw:custom-shape text:anchor-type="paragraph" draw:z-index="0" draw:name="Shape 1" draw:style-name="gr1" svg:width="7.1776in" svg:height="7.3476in" svg:x="0.5102in" svg:y="0.7472in"><text:p/>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range-x-minimum="0" draw:handle-range-x-maximum="21600" draw:handle-position="$0 top" draw:handle-position-x="$0" draw:handle-position-y="top"/></draw:enhanced-geometry></draw:custom-shape><text:span text:style-name="T1">YOUR</text:span>KITCHEN</text:p>
      <text:p text:style-name="P5">Projeto de <text:span text:style-name="T2">Engenharia</text:span> </text:p>
      <text:p text:style-name="P6">Informátic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lun<text:span text:style-name="T3">o:</text:span></text:p>
      <text:p text:style-name="P9">Jorge Dan<text:span text:style-name="T4">iel Sampaio Melo Teixeira </text:span><text:span text:style-name="T3">a</text:span><text:span text:style-name="T4">l81547</text:span></text:p>
      <text:p text:style-name="P9"/>
      <text:p text:style-name="P8">Docentes:</text:p>
      <text:p text:style-name="P8">sd</text:p>
      <text:p text:style-name="P10">Tabela de <text:span text:style-name="T5">C</text:span>onteúdos</text:p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</text:index-body>
      </text:table-of-content>
      <text:h text:style-name="P12" text:outline-level="1">Introdução</text:h>
      <text:p text:style-name="P13">Neste projeto final de Engenharia informática, foi <text:span text:style-name="T6">desenvolvido uma solução multiplataforma </text:span><text:span text:style-name="T7">POS (Point of sale), KDS (Kitchen Display System)</text:span><text:span text:style-name="T6"> e </text:span><text:span text:style-name="T7">Backoffice,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emiCondensed" svg:font-family="'Noto Sans SemiCondensed'" style:font-family-generic="system" style:font-pitch="variable"/>
  </office:font-face-decls>
  <office:styles>
    <draw:fill-image draw:name="Bitmap_20_4" draw:display-name="Bitmap 4" xlink:href="Pictures/100000000000000800000008CF8EA02F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emiCondensed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SemiCondensed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emiCondensed" style:font-family-asian="'Noto Sans SemiCondensed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1201in" fo:margin-right="0.1201in" fo:margin-top="0in" fo:margin-bottom="0.0972in" style:contextual-spacing="false" fo:line-height="115%" fo:text-indent="0in" style:auto-text-indent="false" fo:background-color="transparent"/>
      <style:text-properties style:font-name="Inter" fo:font-family="Inter" style:font-pitch="variable" style:text-underline-style="none" officeooo:rsid="000d0c40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margin-left="0.1201in" fo:margin-right="0.1201in" fo:margin-top="0.1665in" fo:margin-bottom="0.0835in" style:contextual-spacing="false" fo:text-align="end" style:justify-single-word="false" fo:text-indent="0in" style:auto-text-indent="false" fo:background-color="transparent" fo:keep-with-next="always"/>
      <style:text-properties style:font-name="Inter" fo:font-family="Inter" style:font-pitch="variable" fo:font-size="40pt" style:text-underline-style="solid" style:text-underline-width="auto" style:text-underline-color="font-color" fo:font-weight="bold" officeooo:rsid="000e68c4" style:font-size-asian="40pt" style:font-weight-asian="bold" style:font-size-complex="4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846in" style:type="center"/>
          <style:tab-stop style:position="7.1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846in" style:type="center"/>
          <style:tab-stop style:position="7.1701in" style:type="right"/>
        </style:tab-stops>
      </style:paragraph-properties>
    </style:style>
    <style:style style:name="Subtitle" style:family="paragraph" style:parent-style-name="Heading" style:next-style-name="Text_20_body" style:class="chapter">
      <loext:graphic-properties draw:fill="none" draw:fill-color="#729fcf"/>
      <style:paragraph-properties fo:margin-left="0.1201in" fo:margin-right="0.1201in" fo:margin-top="0.0417in" fo:margin-bottom="0.0835in" style:contextual-spacing="false" fo:text-align="start" style:justify-single-word="false" fo:text-indent="0in" style:auto-text-indent="false" fo:background-color="transparent" fo:keep-with-next="always"/>
      <style:text-properties style:font-name="Inter" fo:font-family="Inter" style:font-pitch="variable" fo:font-size="32pt" style:text-underline-style="none" fo:font-weight="bold" style:font-size-asian="32pt" style:font-weight-asian="bold" style:font-size-complex="3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="none" draw:fill-color="#729fcf"/>
      <style:paragraph-properties fo:margin-left="0.1201in" fo:margin-right="0.1201in" fo:margin-top="0.1665in" fo:margin-bottom="0.0835in" style:contextual-spacing="false" fo:text-align="start" style:justify-single-word="false" fo:text-indent="0in" style:auto-text-indent="false" fo:background-color="transparent" fo:keep-with-next="always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5846in" style:type="center"/>
          <style:tab-stop style:position="7.1701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.170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color="#ffffff" loext:opacity="100%" fo:font-size="20pt" fo:font-weight="bold" officeooo:rsid="0027c929" officeooo:paragraph-rsid="0027c929" style:font-size-asian="20pt" style:font-weight-asian="bold" style:font-size-complex="20pt" style:font-weight-complex="bold"/>
    </style:style>
    <style:page-layout style:name="Mpm1">
      <style:page-layout-properties fo:page-width="8.2701in" fo:page-height="11.6902in" style:num-format="1" style:print-orientation="portrait" fo:margin-top="0.55in" fo:margin-bottom="0.55in" fo:margin-left="0.55in" fo:margin-right="0.55in" fo:border="2.24pt solid #2a6099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gradient-step-count="0" draw:fill-hatch-solid="false" draw:fill-image-name="Bitmap_20_4" draw:fill-image-width="0in" draw:fill-image-height="0in" style:repeat="repeat" draw:fill-image-ref-point-x="0%" draw:fill-image-ref-point-y="0%" draw:fill-image-ref-point="center" draw:tile-repeat-offset="0% vertical" style:footnote-max-height="1in" loext:margin-gutter="0in">
        <style:background-image xlink:href="Pictures/100000000000000800000008CF8EA02F.png" xlink:type="simple" xlink:actuate="onLoad"/>
        <style:columns fo:column-count="1" fo:column-gap="0in"/>
        <style:footnote-sep style:width="0.0071in" style:distance-before-sep="0.0402in" style:distance-after-sep="0.0402in" style:line-style="solid" style:adjustment="center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5in" fo:margin-bottom="0.5in" fo:margin-left="0.5in" fo:margin-right="0.5in" fo:background-color="#729fc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729fc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701in" fo:page-height="11.6902in" style:num-format="1" style:print-orientation="portrait" fo:margin-top="0.5in" fo:margin-bottom="0.2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3598in" fo:margin-left="6.8299in" fo:margin-right="0in" fo:margin-top="0in" fo:background-color="#729fcf" style:dynamic-spacing="false" draw:fill="solid" draw:fill-color="#729fcf" draw:opacity="100%"/>
      </style:footer-style>
    </style:page-layout>
    <style:style style:name="Mdp1" style:family="drawing-page">
      <style:drawing-page-properties draw:fill="bitmap" draw:background-size="full" draw:fill-color="#729fcf" draw:gradient-step-count="0" draw:fill-hatch-solid="false" draw:fill-image-name="Bitmap_20_4" draw:fill-image-width="0in" draw:fill-image-height="0in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729fcf" draw:opacity="100%"/>
    </style:style>
  </office:automatic-styles>
  <office:master-styles>
    <style:master-page style:name="Standard" style:page-layout-name="Mpm1" draw:style-name="Mdp1" style:next-style-name="Index"/>
    <style:master-page style:name="Endnote" style:page-layout-name="Mpm2" draw:style-name="Mdp2"/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 style:next-style-name="Left_20_Page"/>
    <style:master-page style:name="Envelope" style:page-layout-name="Mpm6" draw:style-name="Mdp2"/>
    <style:master-page style:name="Index" style:page-layout-name="Mpm7" draw:style-name="Mdp3" style:next-style-name="Página"/>
    <style:master-page style:name="HTML" loext:hidden="true" style:hidden="true" style:page-layout-name="Mpm8" draw:style-name="Mdp2"/>
    <style:master-page style:name="Footnote" style:page-layout-name="Mpm2" draw:style-name="Mdp2"/>
    <style:master-page style:name="Landscape" style:page-layout-name="Mpm9" draw:style-name="Mdp2"/>
    <style:master-page style:name="Página" style:page-layout-name="Mpm10" draw:style-name="Mdp2">
      <style:footer>
        <text:p text:style-name="MP1"><text:bookmark-start text:name="PageNumWizard_FOOTER_Página3"/><text:page-number text:select-page="current" text:page-adjust="-2">2</text:page-number><text:bookmark-end text:name="PageNumWizard_FOOTER_Página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14:00:17.445607951</meta:creation-date>
    <dc:date>2026-05-28T14:31:55.513598591</dc:date>
    <meta:editing-duration>PT1H30M25S</meta:editing-duration>
    <meta:editing-cycles>34</meta:editing-cycles>
    <meta:generator>LibreOffice/25.2.3.2$Linux_X86_64 LibreOffice_project/520$Build-2</meta:generator>
    <meta:print-date>2026-04-28T14:50:50.870930385</meta:print-date>
    <meta:printed-by>PDF files</meta:printed-by>
    <meta:document-statistic meta:table-count="0" meta:image-count="0" meta:object-count="0" meta:page-count="4" meta:paragraph-count="13" meta:word-count="44" meta:character-count="312" meta:non-whitespace-character-count="280"/>
  </office:meta>
</office:document-meta>
</file>